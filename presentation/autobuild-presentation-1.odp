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41cm" fo:min-width="24.451cm" fo:padding-top="0.079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33cm" fo:min-width="0cm" fo:padding-top="0.138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562cm" fo:min-width="0cm" fo:padding-top="0.089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9cm" fo:min-width="0cm" fo:padding-top="0.04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562cm" fo:min-width="0cm" fo:padding-top="0.089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9cm" fo:min-width="0cm" fo:padding-top="0.049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9" style:family="presentation" style:parent-style-name="Title3-title">
      <style:graphic-properties draw:stroke="none" draw:fill="none" draw:fill-color="#ffffff" draw:textarea-horizontal-align="justify" draw:textarea-vertical-align="middle" fo:min-height="2.651cm" draw:shadow-color="#808080" loext:decorative="false"/>
      <style:paragraph-properties style:writing-mode="lr-tb"/>
    </style:style>
    <style:style style:name="pr10" style:family="presentation" style:parent-style-name="Title3-outline1">
      <style:graphic-properties draw:stroke="none" draw:fill="none" draw:fill-color="#ffffff" draw:textarea-horizontal-align="justify" draw:textarea-vertical-align="top" fo:min-height="5.738cm" draw:shadow-color="#808080" loext:decorative="false"/>
      <style:paragraph-properties style:writing-mode="lr-tb"/>
    </style:style>
    <style:style style:name="pr11" style:family="presentation" style:parent-style-name="Title3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004cm" fo:margin-bottom="0.304cm" fo:line-height="93%" fo:text-indent="0cm" style:punctuation-wrap="simple" style:line-break="strict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margin-top="0.004cm" fo:margin-bottom="0.229cm" fo:line-height="93%" fo:text-indent="0cm" style:punctuation-wrap="simple" style:line-break="strict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3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presentation:style-name="pr1" draw:text-style-name="P2" draw:layer="layout" svg:width="25.008cm" svg:height="4.467cm" draw:transform="skewX (1.6669425588981E-017) rotate (0.139626340159546) translate (1.05cm 8.027cm)" presentation:class="title" presentation:user-transformed="true">
          <draw:text-box>
            <text:list text:style-name="L1">
              <text:list-header>
                <text:p text:style-name="P1"><text:span text:style-name="T1">Autobuild Virtualization Platform</text:span></text:p>
              </text:list-header>
            </text:list>
          </draw:text-box>
        </draw:frame>
        <draw:custom-shape draw:style-name="gr1" draw:text-style-name="P3" draw:layer="layout" svg:width="24.451cm" svg:height="1.72cm" draw:transform="rotate (0.139626340159546) translate (1.706cm 11.513cm)">
          <text:list text:style-name="L2">
            <text:list-header>
              <text:p text:style-name="P1"><text:span text:style-name="T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" presentation:class="page"/>
          <draw:frame presentation:style-name="pr2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" xml:id="id2" draw:id="id2">
        <draw:frame presentation:style-name="pr3" draw:text-style-name="P2" draw:layer="layout" svg:width="25.003cm" svg:height="2.65cm" draw:transform="rotate (0.139626340159546) translate (0.28cm 1.387cm)" presentation:class="title" presentation:user-transformed="true">
          <draw:text-box>
            <text:list text:style-name="L1">
              <text:list-header>
                <text:p text:style-name="P1"><text:span text:style-name="T1">Executive Presentation</text:span></text:p>
              </text:list-header>
            </text:list>
          </draw:text-box>
        </draw:frame>
        <draw:frame presentation:style-name="pr4" draw:text-style-name="P2" draw:layer="layout" svg:width="24.637cm" svg:height="9.137cm" svg:x="1.397cm" svg:y="4.206cm" presentation:class="outline" presentation:user-transformed="true">
          <draw:text-box>
            <text:list text:style-name="L3">
              <text:list-item>
                <text:p text:style-name="P5"><text:span text:style-name="T1">Objectiv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o deliver a full-featured, open-source virtualization platform that includ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detailed node management, </text:span></text:p>
                      </text:list-item>
                      <text:list-item>
                        <text:p text:style-name="P6"><text:span text:style-name="T1">automated provisioning, </text:span></text:p>
                      </text:list-item>
                      <text:list-item>
                        <text:p text:style-name="P6"><text:span text:style-name="T1">integrated snapshots </text:span></text:p>
                      </text:list-item>
                      <text:list-item>
                        <text:p text:style-name="P6"><text:span text:style-name="T1">and comprehensive backup/restore capabilities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2" presentation:class="page"/>
          <draw:frame presentation:style-name="pr5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xml:id="id3" draw:id="id3">
        <draw:frame presentation:style-name="pr6" draw:text-style-name="P2" draw:layer="layout" svg:width="25.003cm" svg:height="2.65cm" draw:transform="rotate (0.139626340159546) translate (0.187cm 1.943cm)" presentation:class="title" presentation:user-transformed="true">
          <draw:text-box>
            <text:list text:style-name="L1">
              <text:list-header>
                <text:p text:style-name="P1"><text:span text:style-name="T1">Title Slide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utobuild: <text:s/>The Future of Open-Source Virtualization</text:span></text:p>
              </text:list-item>
              <text:list-item>
                <text:p text:style-name="P5"><text:span text:style-name="T1">Modernizing Infrastructure Through Automation and Open Standard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bjective: <text:s/>Full-featured virtualization with detailed node management, snapshots, and backup/restore.</text:span></text:p>
                  </text:list-item>
                  <text:list-item>
                    <text:p text:style-name="P5"><text:span text:style-name="T3">Platform: <text:s/>Makefile-driven KVM/Libvirt Ecosystem</text:span></text:p>
                  </text:list-item>
                  <text:list-item>
                    <text:p text:style-name="P5"><text:span text:style-name="T3">Presenter: <text:s/>Thomas Sandholm</text:span></text:p>
                  </text:list-item>
                  <text:list-item>
                    <text:p text:style-name="P5"><text:span text:style-name="T3">Date: <text:s/>July 7, 2026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3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xml:id="id4" draw:id="id4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Stategic Vision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 Full-Featured Virtualization Ecosystem</text:span></text:p>
              </text:list-item>
              <text:list-item>
                <text:p text:style-name="P5"><text:span text:style-name="T1">Our Goal: <text:s/>To bridge the gap between complex enterprise virtualization and the simplicity of open-source toolkit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pen Source Sovereignty: <text:s/>Built on industry-standard KVM and Libvirt to ensure no vendor lock-in.</text:span></text:p>
                  </text:list-item>
                  <text:list-item>
                    <text:p text:style-name="P5"><text:span text:style-name="T3">Feature Richness: <text:s/>Delivering enterprise-grade features (Snapshotting, Backups, Role-based Config) in a lean, manageable package.</text:span></text:p>
                  </text:list-item>
                  <text:list-item>
                    <text:p text:style-name="P5"><text:span text:style-name="T3">Operational Excellence: <text:s/>Reducing manual intervention through aggressive “Infrastructure as Code” (IaC) principles.</text:span></text:p>
                    <text:p text:style-name="P5"><text:span text:style-name="T3"/></text:p>
                    <text:p text:style-name="P5"><text:span text:style-name="T3"/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4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xml:id="id5" draw:id="id5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Challenges in Modern Virtualization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Complexity and Manual Overhead</text:span></text:p>
              </text:list-item>
              <text:list-item>
                <text:p text:style-name="P5"><text:span text:style-name="T1">Traditional virtualization management often suffers from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rovisioning Bottlenecks: <text:s/>Manual installation and configuration are slow and error-prone.</text:span></text:p>
                  </text:list-item>
                  <text:list-item>
                    <text:p text:style-name="P5"><text:span text:style-name="T3">Configuration Drift: <text:s/>Inconsistent node setups leading to “snowflake” servers.</text:span></text:p>
                  </text:list-item>
                  <text:list-item>
                    <text:p text:style-name="P5"><text:span text:style-name="T3">Management Silos: <text:s/>Difficulty in managing snapshots, backups, and network configurations across disparate nodes.</text:span></text:p>
                  </text:list-item>
                  <text:list-item>
                    <text:p text:style-name="P5"><text:span text:style-name="T3">Scaling Friction: High effort required to deploy multiple nodes with specific roles (Docker, Jenkins, Database)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5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xml:id="id6" draw:id="id6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Solution Architecture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utobuild Platform: <text:s/>Power and Simplicity</text:span></text:p>
              </text:list-item>
              <text:list-item>
                <text:p text:style-name="P5"><text:span text:style-name="T1">A Makefile-driven orchestration layer that sits atop the industry's most reliable virtualization stack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Hypervisor: <text:s/>KVM (Kernel-based Virtual Machine) for near-native performance.</text:span></text:p>
                  </text:list-item>
                  <text:list-item>
                    <text:p text:style-name="P5"><text:span text:style-name="T3">Management Engine: <text:s/>Libvirt for robust API-driven control.</text:span></text:p>
                  </text:list-item>
                  <text:list-item>
                    <text:p text:style-name="P5"><text:span text:style-name="T3">Orchestration: <text:s/>GNU Makefile logic for predictable, repeatable, and fast deployments.</text:span></text:p>
                  </text:list-item>
                  <text:list-item>
                    <text:p text:style-name="P5"><text:span text:style-name="T3">Guest OS: <text:s/>Automated Ubuntu Cloud Image integration for modern, cloud-native workload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6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xml:id="id7" draw:id="id7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Automated Provisioning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Role-Based Deployment at Scale</text:span></text:p>
              </text:list-item>
              <text:list-item>
                <text:p text:style-name="P5"><text:span text:style-name="T1">Transforming raw cloud images into production-ready nodes in second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Role Driven Customization: <text:s/>Define a ROLE (e.g., docker, jenkins, gluster) and the platform automatically injects the correct packages, boot commands,and mounts.</text:span></text:p>
                  </text:list-item>
                  <text:list-item>
                    <text:p text:style-name="P5"><text:span text:style-name="T3">Cloud-Init Integration: <text:s/>Seamlessly stitches together user-data, meta-data and network-config.</text:span></text:p>
                  </text:list-item>
                  <text:list-item>
                    <text:p text:style-name="P5"><text:span text:style-name="T3">Backing Images: <text:s/>Uses QCOW2 overlays on shared base images to minimize disk usage and speed up cloning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7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xml:id="id8" draw:id="id8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Advanced Storage Management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Tailored Node Architectures</text:span></text:p>
              </text:list-item>
              <text:list-item>
                <text:p text:style-name="P5"><text:span text:style-name="T1">Detailed disk management beyond just a root filesystem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ulti-Disk Provisioning: <text:s/>Automatically creates and attaches specialed disk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Root Disk: <text:s/>Base OS with flexible resizing.</text:span></text:p>
                      </text:list-item>
                      <text:list-item>
                        <text:p text:style-name="P6"><text:span text:style-name="T1">Swap Disk: <text:s/>Optimized memory management.</text:span></text:p>
                      </text:list-item>
                      <text:list-item>
                        <text:p text:style-name="P6"><text:span text:style-name="T1">Data Disk: <text:s/>Persistent storage for user data (/home).</text:span></text:p>
                      </text:list-item>
                      <text:list-item>
                        <text:p text:style-name="P6"><text:span text:style-name="T1">Database/Web Disks: <text:s/>Dedicated volumes for high-performance I/O application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utomated Allocation: <text:s/>Disk sizes are configurable via simple Makefile Variabl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8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xml:id="id9" draw:id="id9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Enterprise Reliability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Integrated Snapshots &amp; Backup/Restore</text:span></text:p>
              </text:list-item>
              <text:list-item>
                <text:p text:style-name="P5"><text:span text:style-name="T1">Ensuring business continuity with built-in recovery tool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utomated Snapshotting: <text:s/>A “fresh” snapshot is created immediately upon first boot, allowing for instant “reset to factory.”</text:span></text:p>
                  </text:list-item>
                  <text:list-item>
                    <text:p text:style-name="P5"><text:span text:style-name="T3">Snapshot Management: <text:s/>Simple commands to create auto-snap snapshots during development or maintenance.</text:span></text:p>
                  </text:list-item>
                  <text:list-item>
                    <text:p text:style-name="P5"><text:span text:style-name="T3">Comprehensive Backup: <text:s/>Full backup of VM metadata (XML) and disk images into compressed archives.</text:span></text:p>
                  </text:list-item>
                  <text:list-item>
                    <text:p text:style-name="P5"><text:span text:style-name="T3">One-Command Restore: <text:s/>Recover a lost or corrupted node with a single make restore command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9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xml:id="id10" draw:id="id10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Detailed Node Management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Network Flexibility &amp; Ansible Integration</text:span></text:p>
              </text:list-item>
              <text:list-item>
                <text:p text:style-name="P5"><text:span text:style-name="T1">Managing nodes is more than just running them; it’s about integrating them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etwork Agility: <text:s/>Support for both Static (mapped via DNS/Hosts) and DHCP configurations.</text:span></text:p>
                  </text:list-item>
                  <text:list-item>
                    <text:p text:style-name="P5"><text:span text:style-name="T3">Ansible Ecosystem: <text:s/>Automatic registration of new nodes into Ansible inventories.</text:span></text:p>
                  </text:list-item>
                  <text:list-item>
                    <text:p text:style-name="P5"><text:span text:style-name="T3">Inventory Sync: <text:s/>Seamlessly pushes host configurations to central management servers.</text:span></text:p>
                  </text:list-item>
                  <text:list-item>
                    <text:p text:style-name="P5"><text:span text:style-name="T3">SSH Lifecycle: <text:s/>Integrated sshresest and key injections for secure, immediate acces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0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xml:id="id11" draw:id="id11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User-Centric Interfaces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Empowering Every Skill Level</text:span></text:p>
              </text:list-item>
              <text:list-item>
                <text:p text:style-name="P5"><text:span text:style-name="T1">Accessibility through three distinct management tier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LI (Command Line Interface): <text:s/>High-efficiency Makefile targets for power users and CI/CD pipelines.</text:span></text:p>
                  </text:list-item>
                  <text:list-item>
                    <text:p text:style-name="P5"><text:span text:style-name="T3">Desktop GUI: <text:s/>A standalone PyQt5 application for point-and-click node management and real-time console logging.</text:span></text:p>
                  </text:list-item>
                  <text:list-item>
                    <text:p text:style-name="P5"><text:span text:style-name="T3">Web UI: <text:s/>A Node.js-based interface for remote monitoring and management (in development).</text:span></text:p>
                  </text:list-item>
                  <text:list-item>
                    <text:p text:style-name="P5"><text:span text:style-name="T3">Full Observability: <text:s/>Integrated logging of all operations for audit and troubleshooting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1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xml:id="id12" draw:id="id12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Conclusion &amp; Roadmap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Efficiency, Scalability, and Sovereignty</text:span></text:p>
              </text:list-item>
              <text:list-item>
                <text:p text:style-name="P5"><text:span text:style-name="T1">Autobuild delivers a professional virtualization experience using open-source tool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urrent State: <text:s/>Fully automated provisioning, role-based customization, and reliable backup/restore.</text:span></text:p>
                  </text:list-item>
                  <text:list-item>
                    <text:p text:style-name="P5"><text:span text:style-name="T3">Key Benefits: <text:s/>Drastic reduction in deployment time, standardized node configurations, and ease of maintenance.</text:span></text:p>
                  </text:list-item>
                  <text:list-item>
                    <text:p text:style-name="P5"><text:span text:style-name="T3">Future Outlook: <text:s/>Further expands of the Web UI, deeper integration with cluster management (GlusterFS), and support for additional distributions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“</text:span><text:span text:style-name="T1">The platform that grows with your infrastructure”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2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3" draw:style-name="dp3" draw:master-page-name="Title3" presentation:presentation-page-layout-name="AL2T1" xml:id="id13" draw:id="id13">
        <draw:frame presentation:style-name="pr9" draw:text-style-name="P4" draw:layer="layout" svg:width="25.003cm" svg:height="2.651cm" svg:x="0.343cm" svg:y="2.133cm" presentation:class="title" presentation:placeholder="true" presentation:user-transformed="true">
          <draw:text-box/>
        </draw:frame>
        <draw:frame presentation:style-name="pr10" draw:text-style-name="P4" draw:layer="layout" svg:width="24.637cm" svg:height="5.988cm" svg:x="1.679cm" svg:y="7.36cm" presentation:class="outline" presentation:user-transformed="true">
          <draw:text-box>
            <text:list text:style-name="L6">
              <text:list-item>
                <text:p>http://github.org/tomsandholm/autobuild.git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3" presentation:class="page"/>
          <draw:frame presentation:style-name="pr11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419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004cm" fo:margin-bottom="0.304cm" fo:line-height="93%" fo:text-align="center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1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004cm" fo:margin-bottom="0.229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004cm" fo:margin-bottom="0.154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004cm" fo:margin-bottom="0.079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56pt" fo:font-style="normal" fo:text-shadow="none" style:text-underline-style="none" fo:font-weight="bold" fo:background-color="transparent" style:font-name-asian="Noto Sans CJK JP:palt" style:font-family-asian="'Noto Sans CJK JP:palt', 'Noto Sans'" style:font-family-generic-asian="swiss" style:font-pitch-asian="variable" style:font-size-asian="5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5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04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.004cm" fo:margin-bottom="0.304cm" fo:line-height="93%" fo:text-align="justify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.004cm" fo:margin-bottom="0.22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.004cm" fo:margin-bottom="0.154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.004cm" fo:margin-bottom="0.07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 style:writing-mode="lr-tb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 style:writing-mode="lr-tb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04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 style:writing-mode="lr-tb"/>
      <style:paragraph-properties fo:margin-left="2.064cm" fo:margin-right="0cm" fo:margin-top="0.004cm" fo:margin-bottom="0.304cm" fo:line-height="93%" fo:text-align="justify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graphic-properties style:writing-mode="lr-tb"/>
      <style:paragraph-properties fo:margin-left="3.175cm" fo:margin-right="0cm" fo:margin-top="0.004cm" fo:margin-bottom="0.22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graphic-properties style:writing-mode="lr-tb"/>
      <style:paragraph-properties fo:margin-left="4.445cm" fo:margin-right="0cm" fo:margin-top="0.004cm" fo:margin-bottom="0.154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2-outline5" style:family="presentation" style:parent-style-name="Title2-outline4">
      <style:graphic-properties style:writing-mode="lr-tb"/>
      <style:paragraph-properties fo:margin-left="5.715cm" fo:margin-right="0cm" fo:margin-top="0.004cm" fo:margin-bottom="0.07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 style:writing-mode="lr-tb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 style:writing-mode="lr-tb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59cm" fo:padding-bottom="0cm" fo:padding-left="0cm" fo:padding-right="0cm" style:writing-mode="lr-tb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75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4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 style:writing-mode="lr-tb"/>
      <style:paragraph-properties fo:margin-left="2.064cm" fo:margin-right="0cm" fo:margin-top="0.004cm" fo:margin-bottom="0.304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1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1pt" style:font-style-complex="normal" style:font-weight-complex="normal" style:font-relief="none"/>
    </style:style>
    <style:style style:name="Title3-outline3" style:family="presentation" style:parent-style-name="Title3-outline2">
      <style:graphic-properties style:writing-mode="lr-tb"/>
      <style:paragraph-properties fo:margin-left="3.175cm" fo:margin-right="0cm" fo:margin-top="0.004cm" fo:margin-bottom="0.22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graphic-properties style:writing-mode="lr-tb"/>
      <style:paragraph-properties fo:margin-left="4.445cm" fo:margin-right="0cm" fo:margin-top="0.004cm" fo:margin-bottom="0.154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3-outline5" style:family="presentation" style:parent-style-name="Title3-outline4">
      <style:graphic-properties style:writing-mode="lr-tb"/>
      <style:paragraph-properties fo:margin-left="5.715cm" fo:margin-right="0cm" fo:margin-top="0.004cm" fo:margin-bottom="0.07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 style:writing-mode="lr-tb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11.554cm" fo:min-width="27.502cm" fo:padding-top="0.13cm" fo:padding-bottom="0.13cm" fo:padding-left="0.25cm" fo:padding-right="0.25cm" fo:wrap-option="no-wrap" draw:shadow-color="#808080" loext:decorative="fals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2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3.299cm" fo:min-width="24.455cm" fo:padding-top="0.13cm" fo:padding-bottom="0.13cm" fo:padding-left="0.25cm" fo:padding-right="0.25cm" fo:wrap-option="no-wrap" draw:shadow-color="#808080" loext:decorative="false"/>
    </style:style>
    <style:style style:name="Mgr13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3.934cm" fo:min-width="27.502cm" fo:padding-top="0.13cm" fo:padding-bottom="0.13cm" fo:padding-left="0.25cm" fo:padding-right="0.25cm" fo:wrap-option="no-wrap" draw:shadow-color="#808080" loext:decorative="false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7" style:family="graphic" style:parent-style-name="standard">
      <style:graphic-properties draw:stroke="solid" svg:stroke-width="0.03cm" svg:stroke-color="#999999" svg:stroke-opacity="100%" draw:stroke-linejoin="round" draw:fill="solid" draw:fill-color="#b2b2b2" draw:textarea-horizontal-align="left" draw:textarea-vertical-align="middle" draw:auto-grow-height="false" fo:min-height="14.35cm" fo:min-width="27.502cm" fo:padding-top="0.13cm" fo:padding-bottom="0.13cm" fo:padding-left="0.25cm" fo:padding-right="0.25cm" fo:wrap-option="no-wrap" draw:shadow-color="#808080" loext:decorative="false"/>
    </style:style>
    <style:style style:name="Mgr18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4.503cm" fo:min-width="27.502cm" fo:padding-top="0.13cm" fo:padding-bottom="0.13cm" fo:padding-left="0.25cm" fo:padding-right="0.25cm" fo:wrap-option="no-wrap" draw:shadow-color="#808080" loext:decorative="false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3.299cm" fo:min-width="23.604cm" fo:padding-top="0.13cm" fo:padding-bottom="0.13cm" fo:padding-left="0.25cm" fo:padding-right="0.25cm" fo:wrap-option="no-wrap" draw:shadow-color="#808080" loext:decorative="false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6.408cm" fo:min-width="27.502cm" fo:padding-top="0.13cm" fo:padding-bottom="0.13cm" fo:padding-left="0.25cm" fo:padding-right="0.25cm" fo:wrap-option="no-wrap" draw:shadow-color="#808080" loext:decorative="false"/>
    </style:style>
    <style:style style:name="Mgr24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6.597cm" fo:min-width="27.501cm" fo:padding-top="0.13cm" fo:padding-bottom="0.13cm" fo:padding-left="0.25cm" fo:padding-right="0.25cm" fo:wrap-option="no-wrap" draw:shadow-color="#808080" loext:decorative="false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8" style:family="graphic" style:parent-style-name="standard">
      <style:graphic-properties draw:stroke="solid" svg:stroke-width="0.03cm" svg:stroke-color="#999999" svg:stroke-opacity="100%" draw:stroke-linejoin="round" draw:fill="solid" draw:fill-color="#b2b2b2" draw:textarea-horizontal-align="left" draw:textarea-vertical-align="middle" draw:auto-grow-height="false" fo:min-height="6.681cm" fo:min-width="25.355cm" fo:padding-top="0.13cm" fo:padding-bottom="0.13cm" fo:padding-left="0.25cm" fo:padding-right="0.25cm" fo:wrap-option="no-wrap" draw:shadow-color="#808080" loext:decorative="false"/>
    </style:style>
    <style:style style:name="Mgr2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2.956cm" fo:min-width="1.277cm" fo:padding-top="0.323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Mgr3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2.956cm" fo:min-width="1.278cm" fo:padding-top="0.323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style:font-independent-line-spacing="true"/>
    </style:style>
    <style:style style:name="MP6" style:family="paragraph">
      <style:paragraph-properties fo:margin-left="0cm" fo:margin-right="0cm" fo:margin-top="0.004cm" fo:margin-bottom="0.004cm" fo:line-height="78%" fo:text-align="end" fo:text-indent="0cm" style:punctuation-wrap="simple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.004cm" fo:margin-bottom="0.004cm" fo:line-height="78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margin-top="0.004cm" fo:margin-bottom="0.004cm" fo:line-height="93%" fo:text-align="end" fo:text-indent="0cm" style:punctuation-wrap="simple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line-height="93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b2b2b2"/>
      <style:paragraph-properties style:font-independent-line-spacing="true"/>
    </style:style>
    <style:style style:name="MP12" style:family="paragraph">
      <loext:graphic-properties draw:fill="none" draw:fill-color="#ffffff"/>
      <style:paragraph-properties style:font-independent-line-spacing="true"/>
    </style:style>
    <style:style style:name="MP13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Liberation Sans Narrow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loext:opacity="100%" style:font-name="Liberation Sans Narrow" fo:font-size="26pt" fo:language="en" fo:country="US" style:font-size-asian="26pt" style:language-asian="en" style:country-asian="US" style:font-size-complex="26pt" style:language-complex="en" style:country-complex="US"/>
    </style:style>
    <style:style style:name="MT4" style:family="text">
      <style:text-properties fo:color="#00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MT6" style:family="text">
      <style:text-properties fo:color="#000000" loext:opacity="100%" style:font-name="Arial"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.002cm" svg:height="11.814cm" svg:x="0cm" svg:y="0cm">
        <text:p/>
        <draw:enhanced-geometry svg:viewBox="0 0 28002 11812" draw:type="non-primitive" draw:enhanced-path="M 0 11811 L 0 0 28001 0 28001 7811 0 11811 N"/>
      </draw:custom-shape>
      <draw:frame presentation:style-name="Default-title" draw:layer="backgroundobjects" svg:width="24.999cm" svg:height="2.646cm" svg:x="1.295cm" svg:y="9.022cm" presentation:class="title" presentation:placeholder="true">
        <draw:text-box/>
      </draw:frame>
      <draw:frame presentation:style-name="Default-outline1" draw:layer="backgroundobjects" svg:width="24.448cm" svg:height="9.203cm" svg:x="0.758cm" svg:y="11.795cm" presentation:class="outline" presentation:placeholder="true">
        <draw:text-box/>
      </draw:frame>
      <draw:frame draw:style-name="Mgr4" draw:text-style-name="MP7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5" draw:text-style-name="MP7" draw:layer="backgroundobjects" svg:width="11.995cm" svg:height="1.085cm" svg:x="15.499cm" svg:y="14.24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6" draw:text-style-name="MP7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Default-title" draw:layer="backgroundobjects" svg:width="16.995cm" svg:height="9.556cm" svg:x="2.001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draw:style-name="Mgr8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9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10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1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5" draw:layer="backgroundobjects" svg:width="24.955cm" svg:height="3.559cm" svg:x="3.047cm" svg:y="12.193cm">
        <text:p/>
        <draw:enhanced-geometry svg:viewBox="0 0 24953 3559" draw:type="non-primitive" draw:enhanced-path="M 0 3558 L 24951 3557 24952 0 0 3558 N"/>
      </draw:custom-shape>
      <draw:custom-shape draw:style-name="Mgr13" draw:text-style-name="MP5" draw:layer="backgroundobjects" svg:width="28.002cm" svg:height="4.194cm" svg:x="0cm" svg:y="0cm">
        <text:p/>
        <draw:enhanced-geometry svg:viewBox="0 0 28001 4193" draw:type="non-primitive" draw:enhanced-path="M 0 4192 L 0 0 28000 0 28000 191 0 4192 N"/>
      </draw:custom-shape>
      <draw:frame presentation:style-name="Title1-title" draw:layer="backgroundobjects" svg:width="24.998cm" svg:height="2.646cm" svg:x="0.19cm" svg:y="1.345cm" presentation:class="title" presentation:placeholder="true">
        <draw:text-box/>
      </draw:frame>
      <draw:frame presentation:style-name="Title1-outline1" draw:layer="backgroundobjects" svg:width="24.633cm" svg:height="9.132cm" svg:x="1.397cm" svg:y="4.207cm" presentation:class="outline" presentation:placeholder="true">
        <draw:text-box/>
      </draw:frame>
      <draw:frame draw:style-name="Mgr14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draw:style-name="Mgr15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draw:style-name="Mgr16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1-title" draw:layer="backgroundobjects" svg:width="16.995cm" svg:height="9.556cm" svg:x="2.001cm" svg:y="2.5cm" presentation:class="page"/>
        <draw:frame presentation:style-name="Title1-notes" draw:layer="backgroundobjects" svg:width="16.995cm" svg:height="13.996cm" svg:x="2.001cm" svg:y="13cm" presentation:class="notes" presentation:placeholder="true">
          <draw:text-box/>
        </draw:frame>
        <draw:frame presentation:style-name="Mpr1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3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5" draw:layer="backgroundobjects" svg:width="24.955cm" svg:height="3.559cm" svg:x="3.047cm" svg:y="12.193cm">
        <text:p/>
        <draw:enhanced-geometry svg:viewBox="0 0 24953 3559" draw:type="non-primitive" draw:enhanced-path="M 0 3558 L 24951 3557 24952 0 0 3558 N"/>
      </draw:custom-shape>
      <draw:custom-shape draw:style-name="Mgr17" draw:text-style-name="MP11" draw:layer="backgroundobjects" svg:width="28.002cm" svg:height="14.61cm" svg:x="0cm" svg:y="1.142cm">
        <text:p/>
        <draw:enhanced-geometry svg:viewBox="0 0 28001 14608" draw:type="non-primitive" draw:enhanced-path="M 0 14607 L 508 14607 28000 10668 28000 0 0 4001 0 14607 N"/>
      </draw:custom-shape>
      <draw:custom-shape draw:style-name="Mgr18" draw:text-style-name="MP5" draw:layer="backgroundobjects" svg:width="28.002cm" svg:height="4.763cm" svg:x="0cm" svg:y="0cm">
        <text:p/>
        <draw:enhanced-geometry svg:viewBox="0 0 28002 4764" draw:type="non-primitive" draw:enhanced-path="M 1 4763 L 0 0 28000 0 28001 762 1 4763 N"/>
      </draw:custom-shape>
      <draw:frame presentation:style-name="Title2-title" draw:layer="backgroundobjects" svg:width="24.999cm" svg:height="2.646cm" svg:x="0.193cm" svg:y="1.971cm" presentation:class="title" presentation:placeholder="true">
        <draw:text-box/>
      </draw:frame>
      <draw:frame presentation:style-name="Title2-outline1" draw:layer="backgroundobjects" svg:width="24.633cm" svg:height="9.132cm" svg:x="1.397cm" svg:y="4.961cm" presentation:class="outline" presentation:placeholder="true">
        <draw:text-box/>
      </draw:frame>
      <draw:frame draw:style-name="Mgr19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draw:style-name="Mgr20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draw:style-name="Mgr21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2-title" draw:layer="backgroundobjects" svg:width="16.995cm" svg:height="9.556cm" svg:x="2.001cm" svg:y="2.5cm" presentation:class="page"/>
        <draw:frame presentation:style-name="Title2-notes" draw:layer="backgroundobjects" svg:width="16.995cm" svg:height="13.996cm" svg:x="2.001cm" svg:y="13cm" presentation:class="notes" presentation:placeholder="true">
          <draw:text-box/>
        </draw:frame>
        <draw:frame presentation:style-name="Mpr5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6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7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8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L 24100 3557 24101 0 0 3557 N"/>
      </draw:custom-shape>
      <draw:custom-shape draw:style-name="Mgr23" draw:text-style-name="MP12" draw:layer="backgroundobjects" svg:width="28.002cm" svg:height="6.668cm" svg:x="0cm" svg:y="0cm">
        <text:p/>
        <draw:enhanced-geometry svg:viewBox="0 0 28001 6669" draw:type="non-primitive" draw:enhanced-path="M 0 6668 L 0 0 28000 0 28000 2667 0 6668 N"/>
      </draw:custom-shape>
      <draw:custom-shape draw:style-name="Mgr23" draw:text-style-name="MP12" draw:layer="backgroundobjects" svg:width="28.002cm" svg:height="6.668cm" svg:x="0cm" svg:y="0cm">
        <text:p/>
        <draw:enhanced-geometry svg:viewBox="0 0 28001 6669" draw:type="non-primitive" draw:enhanced-path="M 0 6668 L 0 0 28000 0 28000 2667 0 6668 N"/>
      </draw:custom-shap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L 24100 3557 24101 0 0 3557 N"/>
      </draw:custom-shape>
      <draw:custom-shape draw:style-name="Mgr24" draw:text-style-name="MP5" draw:layer="backgroundobjects" svg:width="28.001cm" svg:height="6.857cm" svg:x="0.018cm" svg:y="-0.026cm">
        <text:p/>
        <draw:enhanced-geometry svg:viewBox="0 0 28001 6859" draw:type="non-primitive" draw:enhanced-path="M 0 6858 L 0 0 28000 0 28000 2841 0 6858 N"/>
      </draw:custom-shap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L 24100 3557 24101 0 0 3557 N"/>
      </draw:custom-shape>
      <draw:frame presentation:style-name="Title3-title" draw:layer="backgroundobjects" svg:width="24.999cm" svg:height="2.646cm" svg:x="0.193cm" svg:y="3.845cm" presentation:class="title" presentation:placeholder="true">
        <draw:text-box/>
      </draw:frame>
      <draw:frame draw:style-name="Mgr25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draw:style-name="Mgr26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draw:style-name="Mgr27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draw:custom-shape draw:style-name="Mgr28" draw:text-style-name="MP11" draw:layer="backgroundobjects" svg:width="26.119cm" svg:height="7.205cm" draw:transform="rotate (0.191986217719376) translate (0.175cm 7.885cm)">
        <text:p/>
        <draw:enhanced-geometry svg:viewBox="0 0 21600 21600" draw:path-stretchpoint-x="10800" draw:path-stretchpoint-y="10800" draw:text-areas="?f3 ?f4 ?f5 ?f6" draw:type="round-rectangle" draw:modifiers="1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9" draw:text-style-name="MP14" draw:layer="backgroundobjects" svg:width="1.777cm" svg:height="3.404cm" svg:x="0.763cm" svg:y="7.664cm">
        <text:list text:style-name="ML1">
          <text:list-header>
            <text:p text:style-name="MP13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30" draw:text-style-name="MP14" draw:layer="backgroundobjects" svg:width="1.778cm" svg:height="3.404cm" svg:x="25.598cm" svg:y="9.772cm">
        <text:list text:style-name="ML1">
          <text:list-header>
            <text:p text:style-name="MP13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outline1" draw:layer="backgroundobjects" svg:width="24.633cm" svg:height="9.132cm" svg:x="1.679cm" svg:y="7.36cm" presentation:class="outline" presentation:placeholder="true">
        <draw:text-box/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3-title" draw:layer="backgroundobjects" svg:width="16.995cm" svg:height="9.556cm" svg:x="2.001cm" svg:y="2.5cm" presentation:class="page"/>
        <draw:frame presentation:style-name="Title3-notes" draw:layer="backgroundobjects" svg:width="16.995cm" svg:height="13.996cm" svg:x="2.001cm" svg:y="13cm" presentation:class="notes" presentation:placeholder="true">
          <draw:text-box/>
        </draw:frame>
        <draw:frame presentation:style-name="Mpr9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0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11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2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gress</dc:title>
    <meta:creation-date>2026-07-07T13:23:44.039979500</meta:creation-date>
    <dc:date>2026-07-07T15:11:46.100624217</dc:date>
    <meta:print-date>2026-07-07T15:15:41.727036723</meta:print-date>
    <meta:editing-cycles>5</meta:editing-cycles>
    <meta:editing-duration>PT30M8S</meta:editing-duration>
    <meta:generator>LibreOffice/24.2.7.2$Linux_X86_64 LibreOffice_project/420$Build-2</meta:generator>
    <meta:printed-by>PDF files</meta:printed-by>
    <meta:document-statistic meta:object-count="125"/>
  </office:meta>
</office:document-meta>
</file>