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itle" draw:style-name="gr1" draw:text-style-name="P2" draw:layer="layout" svg:width="22.859cm" svg:height="3.332cm" svg:x="1.27cm" svg:y="6.111cm">
          <text:p text:style-name="P1"><text:span text:style-name="T1">Auto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2" draw:text-style-name="P2" draw:layer="layout" svg:width="22.859cm" svg:height="13.332cm" svg:x="1.27cm" svg:y="10cm">
          <text:list text:style-name="L2">
            <text:list-item>
              <text:p text:style-name="P1"><text:span text:style-name="T2">Open-Source KVM Virtualization Platform</text:span></text:p>
            </text:list-item>
            <text:list-item>
              <text:p text:style-name="P1"><text:span text:style-name="T2">Makefile-driven VM provisioning with cloud-init and libvirt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Automated Ubuntu node deployment on KVM/libvirt hosts</text:span></text:p>
            </text:list-item>
            <text:list-item>
              <text:p text:style-name="P1"><text:span text:style-name="T2">Role-based configuration, snapshots, and backup/restore</text:span></text:p>
            </text:list-item>
            <text:list-item>
              <text:p text:style-name="P1"><text:span text:style-name="T2">100% open-source toolchain - no proprietary hypervisor lock-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Title" draw:style-name="gr4" draw:text-style-name="P2" draw:layer="layout" svg:width="22.859cm" svg:height="2.221cm" svg:x="1.27cm" svg:y="1.111cm">
          <text:p text:style-name="P1"><text:span text:style-name="T3">Executive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5" draw:text-style-name="P2" draw:layer="layout" svg:width="22.859cm" svg:height="13.332cm" svg:x="1.27cm" svg:y="3.889cm">
          <text:list text:style-name="L2">
            <text:list-item>
              <text:p text:style-name="P1"><text:span text:style-name="T2">Autobuild automates the full lifecycle of Ubuntu KVM virtual machines</text:span></text:p>
            </text:list-item>
            <text:list-item>
              <text:p text:style-name="P1"><text:span text:style-name="T2">From cloud image download through first-boot configuration, snapshots, and disaster recovery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Business Value:</text:span></text:p>
            </text:list-item>
            <text:list-item>
              <text:p text:style-name="P1"><text:span text:style-name="T4"><text:s text:c="2"/></text:span><text:span text:style-name="T4">Repeatable provisioning - new nodes in minutes, not hours</text:span></text:p>
            </text:list-item>
            <text:list-item>
              <text:p text:style-name="P1"><text:span text:style-name="T4"><text:s text:c="2"/></text:span><text:span text:style-name="T4">Role-based templates - Docker, Jenkins, GitLab, LAMP, and more</text:span></text:p>
            </text:list-item>
            <text:list-item>
              <text:p text:style-name="P1"><text:span text:style-name="T4"><text:s text:c="2"/></text:span><text:span text:style-name="T4">Open-source stack - no licensing cost; portable across Linux hosts</text:span></text:p>
            </text:list-item>
            <text:list-item>
              <text:p text:style-name="P1"><text:span text:style-name="T4"><text:s text:c="2"/></text:span><text:span text:style-name="T4">Built-in DR - snapshots, offline backup, live backup, and restore</text:span></text:p>
            </text:list-item>
          </text:list>
          <text:p text:style-name="P1"><text:span text:style-name="T4"/></text:p>
          <text:list text:continue-numbering="true" text:style-name="L2">
            <text:list-item>
              <text:p text:style-name="P1"><text:span text:style-name="T2">One command: <text:s/>make -e NAME=node01.example.org ROLE=docker no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Title" draw:style-name="gr6" draw:text-style-name="P2" draw:layer="layout" svg:width="22.859cm" svg:height="2.221cm" svg:x="1.27cm" svg:y="1.111cm">
          <text:p text:style-name="P1"><text:span text:style-name="T3">Fully Open-Source 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" draw:style-name="gr7" draw:text-style-name="P2" draw:layer="layout" svg:width="22.859cm" svg:height="1.11cm" svg:x="1.27cm" svg:y="3.056cm">
          <text:p text:style-name="P1"><text:span text:style-name="T5">No proprietary hypervisor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8" draw:text-style-name="P2" draw:layer="layout" svg:width="22.859cm" svg:height="13.332cm" svg:x="1.27cm" svg:y="4.444cm">
          <text:list text:style-name="L2">
            <text:list-item>
              <text:p text:style-name="P1"><text:span text:style-name="T2">Hypervisor: QEMU/KVM - hardware virtualization</text:span></text:p>
            </text:list-item>
            <text:list-item>
              <text:p text:style-name="P1"><text:span text:style-name="T2">Management: libvirt (virsh, virt-install) - VM lifecycle, snapshots, backup</text:span></text:p>
            </text:list-item>
            <text:list-item>
              <text:p text:style-name="P1"><text:span text:style-name="T2">First-boot config: cloud-init - users, packages, network, mounts</text:span></text:p>
            </text:list-item>
            <text:list-item>
              <text:p text:style-name="P1"><text:span text:style-name="T2">Images: Ubuntu Cloud Images - official, maintained base images</text:span></text:p>
            </text:list-item>
            <text:list-item>
              <text:p text:style-name="P1"><text:span text:style-name="T2">Orchestration: GNU Make - declarative, reproducible pipeline</text:span></text:p>
            </text:list-item>
            <text:list-item>
              <text:p text:style-name="P1"><text:span text:style-name="T2">Post-provision: Ansible (optional) - inventory registration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Standard, auditable components - no vendor lock-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Title" draw:style-name="gr9" draw:text-style-name="P2" draw:layer="layout" svg:width="22.859cm" svg:height="2.221cm" svg:x="1.27cm" svg:y="1.111cm">
          <text:p text:style-name="P1"><text:span text:style-name="T3">What the Makefile Prov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" draw:style-name="gr10" draw:text-style-name="P2" draw:layer="layout" svg:width="22.859cm" svg:height="1.11cm" svg:x="1.27cm" svg:y="3.056cm">
          <text:p text:style-name="P1"><text:span text:style-name="T5">Single automation surface for the entire VM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11" draw:text-style-name="P2" draw:layer="layout" svg:width="22.859cm" svg:height="13.332cm" svg:x="1.27cm" svg:y="4.444cm">
          <text:list text:style-name="L2">
            <text:list-item>
              <text:p text:style-name="P1"><text:span text:style-name="T2">sources / base / image - Download and layer qcow2 disk images</text:span></text:p>
            </text:list-item>
            <text:list-item>
              <text:p text:style-name="P1"><text:span text:style-name="T2">role / disks / network-config / meta-data - Assemble cloud-init and storage</text:span></text:p>
            </text:list-item>
            <text:list-item>
              <text:p text:style-name="P1"><text:span text:style-name="T2">node - Provision and start the VM via virt-install</text:span></text:p>
            </text:list-item>
            <text:list-item>
              <text:p text:style-name="P1"><text:span text:style-name="T2">snapshot - Point-in-time VM state capture</text:span></text:p>
            </text:list-item>
            <text:list-item>
              <text:p text:style-name="P1"><text:span text:style-name="T2">backup / live-backup / restore - Offline and online disaster recovery</text:span></text:p>
            </text:list-item>
            <text:list-item>
              <text:p text:style-name="P1"><text:span text:style-name="T2">Delete - Full teardown (VM, storage, Ansible cleanup)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Also: Qt GUI (make gui), Web UI (make web-ui-serv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Title" draw:style-name="gr12" draw:text-style-name="P2" draw:layer="layout" svg:width="22.859cm" svg:height="2.221cm" svg:x="1.27cm" svg:y="1.111cm">
          <text:p text:style-name="P1"><text:span text:style-name="T3">End-to-End Provisioning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13" draw:text-style-name="P2" draw:layer="layout" svg:width="22.859cm" svg:height="13.332cm" svg:x="1.27cm" svg:y="3.889cm">
          <text:list text:style-name="L2">
            <text:list-item>
              <text:p text:style-name="P1"><text:span text:style-name="T2">1. Sources - Download official Ubuntu cloud image (e.g. Noble 24.04)</text:span></text:p>
            </text:list-item>
            <text:list-item>
              <text:p text:style-name="P1"><text:span text:style-name="T2">2. Base - Master qcow2 backing store at /var/lib/kvmbld/base/</text:span></text:p>
            </text:list-item>
            <text:list-item>
              <text:p text:style-name="P1"><text:span text:style-name="T2">3. Image - Per-node copy-on-write root disk with configurable size</text:span></text:p>
            </text:list-item>
            <text:list-item>
              <text:p text:style-name="P1"><text:span text:style-name="T2">4. Role - Compose user-data from role-specific templates</text:span></text:p>
            </text:list-item>
            <text:list-item>
              <text:p text:style-name="P1"><text:span text:style-name="T2">5. Disks - Provision swap, data, database, and web disks</text:span></text:p>
            </text:list-item>
            <text:list-item>
              <text:p text:style-name="P1"><text:span text:style-name="T2">6. Network - Generate static or DHCP network-config</text:span></text:p>
            </text:list-item>
            <text:list-item>
              <text:p text:style-name="P1"><text:span text:style-name="T2">7. Node - virt-install --import with cloud-init injection</text:span></text:p>
            </text:list-item>
            <text:list-item>
              <text:p text:style-name="P1"><text:span text:style-name="T2">8. Finalize - Start VM, create fresh snapshot, register in Ans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Title" draw:style-name="gr14" draw:text-style-name="P2" draw:layer="layout" svg:width="22.859cm" svg:height="2.221cm" svg:x="1.27cm" svg:y="1.111cm">
          <text:p text:style-name="P1"><text:span text:style-name="T3">cloud-init: Detailed Node Provisi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" draw:style-name="gr15" draw:text-style-name="P2" draw:layer="layout" svg:width="22.859cm" svg:height="1.11cm" svg:x="1.27cm" svg:y="3.056cm">
          <text:p text:style-name="P1"><text:span text:style-name="T5">Configuration-as-code at first 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16" draw:text-style-name="P2" draw:layer="layout" svg:width="22.859cm" svg:height="13.332cm" svg:x="1.27cm" svg:y="4.444cm">
          <text:list text:style-name="L2">
            <text:list-item>
              <text:p text:style-name="P1"><text:span text:style-name="T2">Three cloud-init artifacts assembled per node:</text:span></text:p>
            </text:list-item>
            <text:list-item>
              <text:p text:style-name="P1"><text:span text:style-name="T4"><text:s text:c="2"/></text:span><text:span text:style-name="T4">meta-data - Instance ID, hostname, role, environment, SSH keys</text:span></text:p>
            </text:list-item>
            <text:list-item>
              <text:p text:style-name="P1"><text:span text:style-name="T4"><text:s text:c="2"/></text:span><text:span text:style-name="T4">user-data - Packages, users, mounts, boot commands, APT config</text:span></text:p>
            </text:list-item>
            <text:list-item>
              <text:p text:style-name="P1"><text:span text:style-name="T4"><text:s text:c="2"/></text:span><text:span text:style-name="T4">network-config - Static IP (bridge br0) or DHCP</text:span></text:p>
            </text:list-item>
          </text:list>
          <text:p text:style-name="P1"><text:span text:style-name="T4"/></text:p>
          <text:list text:continue-numbering="true" text:style-name="L2">
            <text:list-item>
              <text:p text:style-name="P1"><text:span text:style-name="T2">Role-based assembly (ROLE variable) pulls fragments from:</text:span></text:p>
            </text:list-item>
            <text:list-item>
              <text:p text:style-name="P1"><text:span text:style-name="T4"><text:s text:c="2"/></text:span><text:span text:style-name="T4">packages-dir/, bootcmd-dir/, mounts-dir/, runcmd-dir/, apt-dir/</text:span></text:p>
            </text:list-item>
          </text:list>
          <text:p text:style-name="P1"><text:span text:style-name="T4"/></text:p>
          <text:list text:continue-numbering="true" text:style-name="L2">
            <text:list-item>
              <text:p text:style-name="P1"><text:span text:style-name="T2">Result: Each node boots fully configured - no manual post-install step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itle" draw:style-name="gr17" draw:text-style-name="P2" draw:layer="layout" svg:width="22.859cm" svg:height="2.221cm" svg:x="1.27cm" svg:y="1.111cm">
          <text:p text:style-name="P1"><text:span text:style-name="T3">libvirt: VM Instantiation &amp;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18" draw:text-style-name="P2" draw:layer="layout" svg:width="22.859cm" svg:height="13.332cm" svg:x="1.27cm" svg:y="3.889cm">
          <text:list text:style-name="L2">
            <text:list-item>
              <text:p text:style-name="P1"><text:span text:style-name="T2">virt-install creates the VM with --import and --cloud-init flags</text:span></text:p>
            </text:list-item>
            <text:list-item>
              <text:p text:style-name="P1"><text:span text:style-name="T2">Attaches root, swap, and data disks as virtio block devices</text:span></text:p>
            </text:list-item>
            <text:list-item>
              <text:p text:style-name="P1"><text:span text:style-name="T2">Configurable RAM, vCPUs, and OS variant (e.g. ubuntu22.04)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virsh manages the full lifecycle:</text:span></text:p>
            </text:list-item>
            <text:list-item>
              <text:p text:style-name="P1"><text:span text:style-name="T4"><text:s text:c="2"/></text:span><text:span text:style-name="T4">Start / stop / destroy VMs</text:span></text:p>
            </text:list-item>
            <text:list-item>
              <text:p text:style-name="P1"><text:span text:style-name="T4"><text:s text:c="2"/></text:span><text:span text:style-name="T4">Snapshot create and delete</text:span></text:p>
            </text:list-item>
            <text:list-item>
              <text:p text:style-name="P1"><text:span text:style-name="T4"><text:s text:c="2"/></text:span><text:span text:style-name="T4">Live backup via virsh backup-begin</text:span></text:p>
            </text:list-item>
            <text:list-item>
              <text:p text:style-name="P1"><text:span text:style-name="T4"><text:s text:c="2"/></text:span><text:span text:style-name="T4">XML dump for backup/restore</text:span></text:p>
            </text:list-item>
          </text:list>
          <text:p text:style-name="P1"><text:span text:style-name="T4"/></text:p>
          <text:list text:continue-numbering="true" text:style-name="L2">
            <text:list-item>
              <text:p text:style-name="P1"><text:span text:style-name="T2">Disk strategy: qcow2 copy-on-write - base image shared across nod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Title" draw:style-name="gr19" draw:text-style-name="P2" draw:layer="layout" svg:width="22.859cm" svg:height="2.221cm" svg:x="1.27cm" svg:y="1.111cm">
          <text:p text:style-name="P1"><text:span text:style-name="T3">Flexible Disk &amp; Network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20" draw:text-style-name="P2" draw:layer="layout" svg:width="22.859cm" svg:height="13.332cm" svg:x="1.27cm" svg:y="3.889cm">
          <text:list text:style-name="L2">
            <text:list-item>
              <text:p text:style-name="P1"><text:span text:style-name="T2">Root (rootfs.qcow2) - 16 GB - OS backed by shared base image</text:span></text:p>
            </text:list-item>
            <text:list-item>
              <text:p text:style-name="P1"><text:span text:style-name="T2">Swap - 8 GB - Swap space</text:span></text:p>
            </text:list-item>
            <text:list-item>
              <text:p text:style-name="P1"><text:span text:style-name="T2">Data - 32 GB - /home or application data</text:span></text:p>
            </text:list-item>
            <text:list-item>
              <text:p text:style-name="P1"><text:span text:style-name="T2">DB / DB Log / Web - Configurable database and docroot volumes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Network: Static (FQDN-resolved IP on br0) or DHCP</text:span></text:p>
            </text:list-item>
            <text:list-item>
              <text:p text:style-name="P1"><text:span text:style-name="T2">Security: Per-node Unix group matching FQDN; SSH restricted to group members</text:span></text:p>
            </text:list-item>
            <text:list-item>
              <text:p text:style-name="P1"><text:span text:style-name="T2">All disk sizes are Makefile variables - set to 0 to omit a dis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Title" draw:style-name="gr21" draw:text-style-name="P2" draw:layer="layout" svg:width="22.859cm" svg:height="2.221cm" svg:x="1.27cm" svg:y="1.111cm">
          <text:p text:style-name="P1"><text:span text:style-name="T3">Snapshots, Backup &amp; Re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" draw:style-name="gr22" draw:text-style-name="P2" draw:layer="layout" svg:width="22.859cm" svg:height="1.11cm" svg:x="1.27cm" svg:y="3.056cm">
          <text:p text:style-name="P1"><text:span text:style-name="T5">Three tiers of data pro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23" draw:text-style-name="P2" draw:layer="layout" svg:width="22.859cm" svg:height="13.332cm" svg:x="1.27cm" svg:y="4.444cm">
          <text:list text:style-name="L2">
            <text:list-item>
              <text:p text:style-name="P1"><text:span text:style-name="T2">Snapshot - virsh snapshot-create-as - Quick rollback point</text:span></text:p>
            </text:list-item>
            <text:list-item>
              <text:p text:style-name="P1"><text:span text:style-name="T2">Fresh snapshot (auto) - Created after first boot - Known-good baseline</text:span></text:p>
            </text:list-item>
            <text:list-item>
              <text:p text:style-name="P1"><text:span text:style-name="T2">Offline backup - Shutdown, tar disks + XML, restart - Full archive to bdir/</text:span></text:p>
            </text:list-item>
            <text:list-item>
              <text:p text:style-name="P1"><text:span text:style-name="T2">Live backup - virsh backup-begin - Zero-downtime disk copy</text:span></text:p>
            </text:list-item>
            <text:list-item>
              <text:p text:style-name="P1"><text:span text:style-name="T2">Restore - Delete, extract, virsh define, start - Disaster recovery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Backup captures all qcow2 disk files + libvirt domain X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Title" draw:style-name="gr24" draw:text-style-name="P2" draw:layer="layout" svg:width="22.859cm" svg:height="2.221cm" svg:x="1.27cm" svg:y="1.111cm">
          <text:p text:style-name="P1"><text:span text:style-name="T3">Summary &amp;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" draw:style-name="gr25" draw:text-style-name="P2" draw:layer="layout" svg:width="22.859cm" svg:height="13.332cm" svg:x="1.27cm" svg:y="3.889cm">
          <text:list text:style-name="L2">
            <text:list-item>
              <text:p text:style-name="P1"><text:span text:style-name="T2">Enterprise-grade VM automation on 100% open source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Speed - make node provisions a configured VM in minutes</text:span></text:p>
            </text:list-item>
            <text:list-item>
              <text:p text:style-name="P1"><text:span text:style-name="T2">Consistency - same pipeline for every role and distribution</text:span></text:p>
            </text:list-item>
            <text:list-item>
              <text:p text:style-name="P1"><text:span text:style-name="T2">Flexibility - 12+ Ubuntu distros, 10+ roles, configurable resources</text:span></text:p>
            </text:list-item>
            <text:list-item>
              <text:p text:style-name="P1"><text:span text:style-name="T2">Resilience - snapshots, backup, live backup, one-command restore</text:span></text:p>
            </text:list-item>
            <text:list-item>
              <text:p text:style-name="P1"><text:span text:style-name="T2">Accessibility - CLI, Qt GUI (make gui), and Web UI</text:span></text:p>
            </text:list-item>
          </text:list>
          <text:p text:style-name="P1"><text:span text:style-name="T2"/></text:p>
          <text:list text:continue-numbering="true" text:style-name="L2">
            <text:list-item>
              <text:p text:style-name="P1"><text:span text:style-name="T2">make -e NAME=myhost.example.org ROLE=general node</text:span></text:p>
            </text:list-item>
            <text:list-item>
              <text:p text:style-name="P1"><text:span text:style-name="T2">make -e NAME=myhost.example.org snapshot</text:span></text:p>
            </text:list-item>
            <text:list-item>
              <text:p text:style-name="P1"><text:span text:style-name="T2">make -e NAME=myhost.example.org back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loext:theme loext:name="Autobuild">
        <loext:theme-colors loext:name="Autobuild">
          <loext:color loext:name="dark1" loext:color="#000000"/>
          <loext:color loext:name="light1" loext:color="#ffffff"/>
          <loext:color loext:name="dark2" loext:color="#333333"/>
          <loext:color loext:name="light2" loext:color="#f5f5f5"/>
          <loext:color loext:name="accent1" loext:color="#e95420"/>
          <loext:color loext:name="accent2" loext:color="#333333"/>
          <loext:color loext:name="accent3" loext:color="#666666"/>
          <loext:color loext:name="accent4" loext:color="#e95420"/>
          <loext:color loext:name="accent5" loext:color="#333333"/>
          <loext:color loext:name="accent6" loext:color="#666666"/>
          <loext:color loext:name="hyperlink" loext:color="#e95420"/>
          <loext:color loext:name="followed-hyperlink" loext:color="#666666"/>
        </loext:theme-colors>
      </loext:the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utobuild Executive Presentation</dc:title>
    <meta:creation-date>2026-07-07T12:17:01.689045601</meta:creation-date>
    <meta:generator>LibreOffice/24.2.7.2$Linux_X86_64 LibreOffice_project/420$Build-2</meta:generator>
    <meta:document-statistic meta:object-count="62"/>
    <meta:user-defined meta:name="Slides" meta:value-type="float">10</meta:user-defined>
  </office:meta>
</office:document-meta>
</file>